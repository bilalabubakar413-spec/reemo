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style:style>
    <style:style style:name="P2" style:parent-style-name="Kop3" style:family="paragraph">
      <style:text-properties fo:font-style="italic" style:font-style-asian="italic" style:font-style-complex="italic"/>
    </style:style>
    <style:style style:name="P3" style:parent-style-name="Kop3" style:family="paragraph">
      <style:text-properties fo:font-style="italic" style:font-style-asian="italic" style:font-style-complex="italic"/>
    </style:style>
    <style:style style:name="P4" style:parent-style-name="Standaard" style:family="paragraph">
      <style:paragraph-properties fo:break-before="page"/>
    </style:style>
    <style:style style:name="P5" style:parent-style-name="Kop2" style:family="paragraph">
      <style:text-properties style:text-underline-type="single" style:text-underline-style="solid" style:text-underline-width="auto" style:text-underline-mode="continuous"/>
    </style:style>
    <style:style style:name="P6" style:parent-style-name="Standaard" style:list-style-name="LFO1" style:family="paragraph"/>
    <style:style style:name="P7" style:parent-style-name="Standaard" style:list-style-name="LFO1" style:family="paragraph"/>
    <style:style style:name="P8" style:parent-style-name="Standaard" style:list-style-name="LFO1" style:family="paragraph"/>
    <style:style style:name="P9" style:parent-style-name="Standaard" style:list-style-name="LFO1" style:family="paragraph"/>
    <style:style style:name="P10" style:parent-style-name="Kop3" style:family="paragraph">
      <style:text-properties fo:font-style="italic" style:font-style-asian="italic" style:font-style-complex="italic"/>
    </style:style>
  </office:automatic-styles>
  <office:body>
    <office:text text:use-soft-page-breaks="true">
      <text:p text:style-name="P1">Samenvatting Interview – Procesanalyse Reemo</text:p>
      <text:p text:style-name="Standaard"/>
      <text:h text:style-name="Kop1" text:outline-level="1">Inleiding</text:h>
      <text:p text:style-name="Standaard">Tijdens het interview met de opdrachtgever hebben we uitgebreid gesproken over hoe Reemo op dit moment werkt. Het doel van het gesprek was om een duidelijk beeld te krijgen van het huidige proces en om te begrijpen waar verbetering nodig is. Uit het gesprek werd duidelijk dat het bedrijf inhoudelijk sterk is in softwareontwikkeling, maar dat veel interne processen nog handmatig en verspreid zijn georganiseerd.</text:p>
      <text:p text:style-name="Standaard">Reemo heeft vorig jaar ongeveer één miljoen euro omzet gedraaid en wil dit jaar verder groeien. De opdrachtgever gaf aan dat de huidige manier van werken nog net werkt, maar dat het bij verdere groei lastig kan worden om alles overzichtelijk en foutloos te houden. Het probleem is dus niet dat het nu volledig misgaat, maar dat het systeem niet goed voorbereid is op verdere groei. Het gesprek liet zien dat veel handelingen afhankelijk zijn van één persoon en dat er weinig standaardisatie is in hoe informatie wordt vastgelegd.</text:p>
      <text:p text:style-name="Standaard">Daarnaast werd duidelijk dat het bedrijf zich professioneel wil positioneren met een nieuwe branding. Daarbij past ook een professionelere interne organisatie. De wens om processen te verbeteren komt dus niet alleen voort uit efficiëntie, maar ook uit uitstraling en toekomstgericht werken.</text:p>
      <text:p text:style-name="Standaard"/>
      <text:h text:style-name="Kop3" text:outline-level="3">Hoe projecten binnenkomen en verlopen</text:h>
      <text:p text:style-name="Standaard">Nieuwe projecten komen meestal binnen via bestaande contacten, netwerkgesprekken of via-via. Er is geen vast marketingproces of centraal systeem waarin nieuwe leads worden bijgehouden. Dit betekent dat nieuwe aanvragen vooral gebaseerd zijn op vertrouwen en relaties.</text:p>
      <text:p text:style-name="Standaard">Wanneer een klant zich meldt, wordt eerst gekeken wat het probleem is. Reemo analyseert wat er technisch al is gebouwd en wat er moet gebeuren. Dit kan bijvoorbeeld door een architectuurscan of door het bekijken van bestaande code. Op basis daarvan wordt een voorstel of advies gemaakt. Dit voorstel kan gaan over het verbeteren van bestaande software of het volledig opnieuw bouwen van een systeem.</text:p>
      <text:p text:style-name="Standaard">Als de klant akkoord gaat, volgt er een architectuurfase, daarna een ontwerpfase en vervolgens de bouwfase. Tijdens de bouw wordt in stappen gewerkt en wordt het werk steeds opnieuw aangepast waar nodig. Er wordt regelmatig overlegd tussen developers en wordt vaak gewerkt met tickets in tools zoals Jira of vergelijkbare systemen bij de klant.</text:p>
      <text:p text:style-name="Standaard">Dit technische proces verloopt volgens de opdrachtgever goed. Wat minder duidelijk is geregeld, is de administratie en het overzicht rondom klanten, contracten, uren en facturen. Deze onderdelen lopen naast het technische proces en zijn minder gestructureerd vastgelegd.</text:p>
      <text:p text:style-name="Standaard"/>
      <text:soft-page-break/>
      <text:h text:style-name="Kop2" text:outline-level="2">Contracten en voorstellen</text:h>
      <text:p text:style-name="Standaard">Wanneer een klant akkoord gaat met een samenwerking, wordt er een contract opgesteld. In het verleden waren deze contracten eenvoudig en vooral functioneel opgesteld. Inmiddels zijn deze professioneler vormgegeven en sluiten ze beter aan bij de nieuwe uitstraling van het bedrijf.</text:p>
      <text:p text:style-name="Standaard">Ook voorstellen voor nieuwe projecten worden gemaakt in een vaste opzet. Hierin staat beschreven wat er gebouwd gaat worden, welke fases er zijn en wat de geschatte kosten zijn. Toch gebeurt het maken en opslaan van deze documenten nog handmatig. Er is geen systeem waarin automatisch klantgegevens worden ingevuld of waarin alle voorstellen per klant centraal worden bewaard.</text:p>
      <text:p text:style-name="Standaard">Daardoor moet informatie soms worden teruggezocht in mails of in verschillende mappen. Dit kost tijd en maakt het proces minder overzichtelijk.</text:p>
      <text:p text:style-name="Standaard"/>
      <text:h text:style-name="Kop3" text:outline-level="3">Urenregistratie</text:h>
      <text:p text:style-name="Standaard">Developers registreren hun uren in een Word-template. Deze wordt opgeslagen als PDF en per e-mail verstuurd naar zowel Reemo als de klant. In principe gebeurt dit wekelijks, maar in de praktijk worden uren soms later aangeleverd.</text:p>
      <text:p text:style-name="Standaard">Als uren te laat worden ingestuurd, moet de opdrachtgever hier handmatig achteraan. Dat kost tijd en zorgt ervoor dat facturen later verstuurd worden. Hierdoor komt de betaling ook later binnen. Dit heeft dus invloed op de planning van inkomsten en kan zorgen voor vertraging in de financiële stroom.</text:p>
      <text:p text:style-name="Standaard">Als er een fout in een timesheet zit, bijvoorbeeld een verkeerd aantal uren, dan moet dit later worden gecorrigeerd. Dat kan via een creditfactuur of via een correctie in een volgende maand. De opdrachtgever gaf aan dat dit extra werk oplevert en dat dit soort situaties liever voorkomen wordt.</text:p>
      <text:p text:style-name="Standaard">Niet alle developers werken op dezelfde manier. Sommige gebruiken bijvoorbeeld Clockify, maar dit is niet standaard binnen het bedrijf. Hierdoor is er geen uniforme manier van registreren en ontbreekt een centrale controle.</text:p>
      <text:p text:style-name="Standaard">Daarnaast wordt duidelijk dat urenregistratie gebaseerd is op vertrouwen. Er wordt niet gewerkt met uitgebreide controlemechanismen. Dit past bij de cultuur van het bedrijf, maar maakt het systeem minder controleerbaar wanneer het aantal medewerkers groeit.</text:p>
      <text:p text:style-name="Standaard"/>
      <text:h text:style-name="Kop3" text:outline-level="3">Facturatie</text:h>
      <text:p text:style-name="Standaard">Het facturatieproces gebeurt handmatig. Eerst worden alle timesheets verzameld. Daarna wordt het contract opgezocht om te controleren welk uurtarief geldt. Vervolgens worden de uren berekend en wordt een factuur gemaakt. De timesheets worden als bijlage meegestuurd.</text:p>
      <text:p text:style-name="Standaard">Openstaande facturen worden ook handmatig bijgehouden. Er is geen duidelijk dashboard waarin direct zichtbaar is welke facturen te laat zijn of hoeveel er nog openstaat per klant. Soms betalen klanten in delen, waardoor facturen langer open blijven staan.</text:p>
      <text:soft-page-break/>
      <text:p text:style-name="Standaard">Er is wel een boekhoudsysteem aanwezig, maar dit biedt volgens de opdrachtgever onvoldoende overzicht. De beschikbare grafieken en overzichten geven geen duidelijk beeld van prestaties per maand of per klant. Hierdoor ontbreekt inzicht op managementniveau.</text:p>
      <text:p text:style-name="Standaard">Het gevolg is dat er regelmatig handmatig gecontroleerd moet worden of betalingen binnen zijn en of herinneringen verstuurd moeten worden. Dit kost tijd en maakt het proces afhankelijk van persoonlijke controle.</text:p>
      <text:p text:style-name="Standaard"/>
      <text:h text:style-name="P2" text:outline-level="3">Opslag van informatie</text:h>
      <text:p text:style-name="Standaard">Bestanden en informatie worden opgeslagen in verschillende systemen, zoals e-mail, Google Drive en soms WhatsApp. Er is geen centrale plek waar alle informatie samenkomt.</text:p>
      <text:p text:style-name="Standaard">Contracten, voorstellen, timesheets en facturen staan verspreid opgeslagen. De opdrachtgever gaf aan dat veel kennis in zijn hoofd zit. Dat betekent dat hij vaak weet waar alles staat en wat er moet gebeuren, maar dat dit voor nieuwe medewerkers minder duidelijk is.</text:p>
      <text:p text:style-name="Standaard">Hierdoor is het lastig om processen eenvoudig over te dragen. Wanneer iemand nieuw begint, is er geen centraal systeem waarin stap voor stap zichtbaar is hoe het proces loopt. Dit maakt het moeilijker om snel overzicht te krijgen.</text:p>
      <text:p text:style-name="Standaard"/>
      <text:h text:style-name="P3" text:outline-level="3">Interne organisatie en groei</text:h>
      <text:p text:style-name="Standaard">Reemo werkt met ongeveer 25 mensen, waarvan het grootste deel developers zijn. Daarnaast zijn er medewerkers op kantoor, zoals architecten en sales. Naarmate het team groeit, wordt het belangrijker dat processen duidelijk en overdraagbaar zijn.</text:p>
      <text:p text:style-name="Standaard">De opdrachtgever gaf aan dat hij zelf weet hoe alles werkt, maar dat dit voor nieuwe medewerkers minder vanzelfsprekend is. Wanneer meerdere mensen betrokken raken bij sales, administratie of klantcontact, wordt het belangrijk om informatie centraal vast te leggen.</text:p>
      <text:p text:style-name="Standaard">De groeiambitie van het bedrijf maakt dit extra belangrijk. Wat nu nog beheersbaar is, kan bij verdubbeling van omzet en projecten snel onoverzichtelijk worden.</text:p>
      <text:p text:style-name="Standaard"/>
      <text:p text:style-name="P4"/>
      <text:soft-page-break/>
      <text:h text:style-name="P5" text:outline-level="2">Wat de opdrachtgever wil</text:h>
      <text:p text:style-name="Standaard">De opdrachtgever wil een centrale webapplicatie of dashboard waarin alle belangrijke informatie samenkomt. Hij wil kunnen inloggen en direct overzicht hebben van alle klanten. Per klant moet zichtbaar zijn:</text:p>
      <text:list text:style-name="LFO1" text:continue-numbering="true">
        <text:list-item>
          <text:p text:style-name="P6">Welke developers eraan werken</text:p>
        </text:list-item>
        <text:list-item>
          <text:p text:style-name="P7">Welke uren zijn geregistreerd</text:p>
        </text:list-item>
        <text:list-item>
          <text:p text:style-name="P8">Welke contracten zijn afgesloten</text:p>
        </text:list-item>
        <text:list-item>
          <text:p text:style-name="P9">Welke facturen zijn verstuurd</text:p>
        </text:list-item>
      </text:list>
      <text:p text:style-name="Standaard">Daarnaast wil hij eenvoudig kunnen zien wat de status is van een klant. Bijvoorbeeld hoeveel uren al zijn opgebouwd, welke facturen nog openstaan en welke afspraken zijn gemaakt.</text:p>
      <text:p text:style-name="Standaard">Het belangrijkste doel is dat er één centrale plek komt waar alle informatie klopt en terug te vinden is. Wanneer er vragen of discussies ontstaan over uren of afspraken, moet het systeem duidelijkheid geven.</text:p>
      <text:p text:style-name="Standaard">Op termijn ziet de opdrachtgever ook mogelijkheden voor koppelingen met andere systemen, zoals boekhoudsoftware of urenregistratietools. Voor nu ligt de focus op een intern systeem dat overzicht en structuur biedt.</text:p>
      <text:p text:style-name="Standaard"/>
      <text:h text:style-name="P10" text:outline-level="3">Conclusie van het interview</text:h>
      <text:p text:style-name="Standaard">Het interview laat zien dat het grootste probleem niet in de technische uitvoering van projecten zit, maar in de organisatie eromheen. Urenregistratie, contractbeheer, facturatie en klantinformatie zijn verspreid over verschillende plekken en worden grotendeels handmatig beheerd.</text:p>
      <text:p text:style-name="Standaard">Zolang het bedrijf klein blijft, is dit nog te overzien. Maar bij verdere groei wordt het moeilijker om overzicht te houden en fouten te voorkomen.</text:p>
      <text:p text:style-name="Standaard">De kern van het vraagstuk is daarom het ontwikkelen van een centrale oplossing waarin klantbeheer, urenregistratie en facturatie samenkomen. Deze oplossing moet zorgen voor overzicht, minder handmatig werk en een duidelijke structuur binnen het bedrijf.</text:p>
      <text:p text:style-name="Standaard">Deze samenvatting vormt de basis voor de verdere uitwerking van de opdrachtafstemming.</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style:font-name-complex="Times New Roman" fo:color="#272727"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Aptos Display" style:font-name-asian="Times New Roman" style:font-name-complex="Times New Roman" fo:color="#0F4761" fo:font-size="20pt" style:font-size-asian="20pt" style:font-size-complex="20pt"/>
    </style:style>
    <style:style style:name="Kop2Char" style:display-name="Kop 2 Char" style:family="text" style:parent-style-name="Standaardalinea-lettertype">
      <style:text-properties style:font-name="Aptos Display" style:font-name-asian="Times New Roman" style:font-name-complex="Times New Roman" fo:color="#0F4761" fo:font-size="16pt" style:font-size-asian="16pt" style:font-size-complex="16pt"/>
    </style:style>
    <style:style style:name="Kop3Char" style:display-name="Kop 3 Char" style:family="text" style:parent-style-name="Standaardalinea-lettertype">
      <style:text-properties style:font-name-asian="Times New Roman" style:font-name-complex="Times New Roman" fo:color="#0F4761" fo:font-size="14pt" style:font-size-asian="14pt" style:font-size-complex="14pt"/>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0F4761"/>
    </style:style>
    <style:style style:name="Kop5Char" style:display-name="Kop 5 Char" style:family="text" style:parent-style-name="Standaardalinea-lettertype">
      <style:text-properties style:font-name-asian="Times New Roman" style:font-name-complex="Times New Roman" fo:color="#0F4761"/>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sian="Times New Roman" style:font-name-complex="Times New Roman" fo:color="#595959"/>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Aptos Display"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style:font-name-complex="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0F4761"/>
    </style:style>
    <style:style style:name="Duidelijkcitaat" style:display-name="Duidelijk citaat" style:family="paragraph" style:parent-style-name="Standaard" style:next-style-name="Standa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DuidelijkcitaatChar" style:display-name="Duidelijk citaat Char" style:family="text" style:parent-style-name="Standaardalinea-lettertype">
      <style:text-properties fo:font-style="italic" style:font-style-asian="italic" style:font-style-complex="italic" fo:color="#0F4761"/>
    </style:style>
    <style:style style:name="Intensieveverwijzing" style:display-name="Intensieve verwijzing" style:family="text" style:parent-style-name="Standaardalinea-lettertype">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ilal Bilal Abubakar Mohamed</meta:initial-creator>
    <dc:creator>Bilal Bilal Abubakar Mohamed</dc:creator>
    <meta:creation-date>2026-03-03T19:26:00Z</meta:creation-date>
    <dc:date>2026-03-03T19:31:00Z</dc:date>
    <meta:template xlink:href="Normal" xlink:type="simple"/>
    <meta:editing-cycles>1</meta:editing-cycles>
    <meta:editing-duration>PT300S</meta:editing-duration>
    <meta:document-statistic meta:page-count="4" meta:paragraph-count="17" meta:word-count="1373" meta:character-count="8910" meta:row-count="62" meta:non-whitespace-character-count="7554"/>
  </office:meta>
</office:document-meta>
</file>